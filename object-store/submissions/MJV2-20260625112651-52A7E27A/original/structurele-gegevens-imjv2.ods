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spreadsheet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 office:version="1.2">
  <office:body>
    <office:spreadsheet>
      <table:table table:name="Verslaggegevens">
        <table:table-row>
          <table:table-cell office:value-type="string">
            <text:p>Gegeven</text:p>
          </table:table-cell>
          <table:table-cell office:value-type="string">
            <text:p>Waarde</text:p>
          </table:table-cell>
        </table:table-row>
        <table:table-row>
          <table:table-cell office:value-type="string">
            <text:p>Naam van de exploitatie</text:p>
          </table:table-cell>
          <table:table-cell office:value-type="string">
            <text:p>Houtzagerij</text:p>
          </table:table-cell>
        </table:table-row>
        <table:table-row>
          <table:table-cell office:value-type="string">
            <text:p>Exploitatie-ID</text:p>
          </table:table-cell>
          <table:table-cell office:value-type="string">
            <text:p>XCV</text:p>
          </table:table-cell>
        </table:table-row>
        <table:table-row>
          <table:table-cell office:value-type="string">
            <text:p>Ingangsdatum toestand</text:p>
          </table:table-cell>
          <table:table-cell office:value-type="string">
            <text:p>2027-01-01</text:p>
          </table:table-cell>
        </table:table-row>
        <table:table-row>
          <table:table-cell office:value-type="string">
            <text:p>NACE-BEL-code</text:p>
          </table:table-cell>
          <table:table-cell office:value-type="string">
            <text:p/>
          </table:table-cell>
        </table:table-row>
        <table:table-row>
          <table:table-cell office:value-type="string">
            <text:p>Adres</text:p>
          </table:table-cell>
          <table:table-cell office:value-type="string">
            <text:p>,  , België</text:p>
          </table:table-cell>
        </table:table-row>
        <table:table-row>
          <table:table-cell office:value-type="string">
            <text:p>Lambert 2008 X</text:p>
          </table:table-cell>
          <table:table-cell office:value-type="string">
            <text:p>None</text:p>
          </table:table-cell>
        </table:table-row>
        <table:table-row>
          <table:table-cell office:value-type="string">
            <text:p>Lambert 2008 Y</text:p>
          </table:table-cell>
          <table:table-cell office:value-type="string">
            <text:p>None</text:p>
          </table:table-cell>
        </table:table-row>
      </table:table>
      <table:table table:name="Exploitatietoestand">
        <table:table-row>
          <table:table-cell office:value-type="string">
            <text:p>Type</text:p>
          </table:table-cell>
          <table:table-cell office:value-type="string">
            <text:p>Code</text:p>
          </table:table-cell>
          <table:table-cell office:value-type="string">
            <text:p>Naam</text:p>
          </table:table-cell>
          <table:table-cell office:value-type="string">
            <text:p>Eigenschappen</text:p>
          </table:table-cell>
          <table:table-cell office:value-type="string">
            <text:p>Verbonden met</text:p>
          </table:table-cell>
          <table:table-cell office:value-type="string">
            <text:p>Status</text:p>
          </table:table-cell>
        </table:table-row>
        <table:table-row>
          <table:table-cell office:value-type="string">
            <text:p>Stookinstallatie</text:p>
          </table:table-cell>
          <table:table-cell office:value-type="string">
            <text:p>OBJ-01</text:p>
          </table:table-cell>
          <table:table-cell office:value-type="string">
            <text:p>Nieuw objec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In gebruik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office:version="1.2">
  <office:styles/>
</office:document-styles>
</file>