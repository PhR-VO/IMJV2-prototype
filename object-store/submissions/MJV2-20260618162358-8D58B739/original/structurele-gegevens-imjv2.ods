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Demo Exploitatie NV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DEMO-EXP-00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9-06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23.990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Zaha Hadidplein 1, 2030 Antwerpen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52224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17046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PL-01</text:p>
          </table:table-cell>
          <table:table-cell office:value-type="string">
            <text:p>Productielijn keramische granulaten</text:p>
          </table:table-cell>
          <table:table-cell office:value-type="string">
            <text:p>Capaciteit: 120000 ton/jaar</text:p>
          </table:table-cell>
          <table:table-cell office:value-type="string">
            <text:p>STK-01; WZI-01; STK-02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STK-01</text:p>
          </table:table-cell>
          <table:table-cell office:value-type="string">
            <text:p>Stoomketel lijn 1</text:p>
          </table:table-cell>
          <table:table-cell office:value-type="string">
            <text:p>Thermisch vermogen: 48 MW; brandstof: aardgas</text:p>
          </table:table-cell>
          <table:table-cell office:value-type="string">
            <text:p>PL-01; EP-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WZI-01</text:p>
          </table:table-cell>
          <table:table-cell office:value-type="string">
            <text:p>Fysico-chemische waterzuivering</text:p>
          </table:table-cell>
          <table:table-cell office:value-type="string">
            <text:p>Neutralisatie + sedimentatie + zandfilter + membraanfiltratie; capaciteit: 52 m3/u</text:p>
          </table:table-cell>
          <table:table-cell office:value-type="string">
            <text:p>PL-01; EP-W-01; PL-02; GW-02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GW-01</text:p>
          </table:table-cell>
          <table:table-cell office:value-type="string">
            <text:p>Winning productieput noord</text:p>
          </table:table-cell>
          <table:table-cell office:value-type="string">
            <text:p>Putdiepte: 82 m; vergund debiet: 180000 m3/jaar; watervoerende laag: HCOV 0600</text:p>
          </table:table-cell>
          <table:table-cell office:value-type="string">
            <text:p>P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EP-L-01</text:p>
          </table:table-cell>
          <table:table-cell office:value-type="string">
            <text:p>Schoorsteen stoomketel</text:p>
          </table:table-cell>
          <table:table-cell office:value-type="string">
            <text:p>Hoogte: 32 m; diameter: 1.2 m; Lambert 2008: 156420, 207880</text:p>
          </table:table-cell>
          <table:table-cell office:value-type="string">
            <text:p>STK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EP-W-01</text:p>
          </table:table-cell>
          <table:table-cell office:value-type="string">
            <text:p>Lozingspunt effluent WZI</text:p>
          </table:table-cell>
          <table:table-cell office:value-type="string">
            <text:p>Lozend naar oppervlaktewater; Lambert 2008: 156385, 207842</text:p>
          </table:table-cell>
          <table:table-cell office:value-type="string">
            <text:p>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STK-02</text:p>
          </table:table-cell>
          <table:table-cell office:value-type="string">
            <text:p>Droogoven lijn 2</text:p>
          </table:table-cell>
          <table:table-cell office:value-type="string">
            <text:p>Thermisch vermogen: 22 MW; brandstof: aardgas; ingebruikname: 20-03-2027</text:p>
          </table:table-cell>
          <table:table-cell office:value-type="string">
            <text:p>PL-01; EP-L-02; PL-02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EP-L-02</text:p>
          </table:table-cell>
          <table:table-cell office:value-type="string">
            <text:p>Schoorsteen droogoven lijn 2</text:p>
          </table:table-cell>
          <table:table-cell office:value-type="string">
            <text:p>Hoogte: 28 m; diameter: 0.9 m; Lambert 2008: 156448, 207862</text:p>
          </table:table-cell>
          <table:table-cell office:value-type="string">
            <text:p>STK-02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PL-02</text:p>
          </table:table-cell>
          <table:table-cell office:value-type="string">
            <text:p>Productielijn recyclaat</text:p>
          </table:table-cell>
          <table:table-cell office:value-type="string">
            <text:p>Capaciteit: 45000 ton/jaar; verwerking van keramisch recyclaat</text:p>
          </table:table-cell>
          <table:table-cell office:value-type="string">
            <text:p>STK-02; 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GW-02</text:p>
          </table:table-cell>
          <table:table-cell office:value-type="string">
            <text:p>Winning productieput zuid</text:p>
          </table:table-cell>
          <table:table-cell office:value-type="string">
            <text:p>Putdiepte: 76 m; vergund debiet: 90000 m3/jaar; watervoerende laag: HCOV 0600</text:p>
          </table:table-cell>
          <table:table-cell office:value-type="string">
            <text:p>PL-02; WZI-01</text:p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