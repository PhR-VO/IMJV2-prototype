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atacenter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TY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2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Kempische Steenweg 293, 3500 Hassel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7082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0470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OBJ-02</text:p>
          </table:table-cell>
          <table:table-cell office:value-type="string">
            <text:p>Waterzuiv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