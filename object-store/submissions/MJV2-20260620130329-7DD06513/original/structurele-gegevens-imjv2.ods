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Verslaggegevens">
        <table:table-row>
          <table:table-cell office:value-type="string">
            <text:p>Gegeven</text:p>
          </table:table-cell>
          <table:table-cell office:value-type="string">
            <text:p>Waarde</text:p>
          </table:table-cell>
        </table:table-row>
        <table:table-row>
          <table:table-cell office:value-type="string">
            <text:p>Naam van de exploitatie</text:p>
          </table:table-cell>
          <table:table-cell office:value-type="string">
            <text:p>Eerste extra exploitatie</text:p>
          </table:table-cell>
        </table:table-row>
        <table:table-row>
          <table:table-cell office:value-type="string">
            <text:p>Exploitatie-ID</text:p>
          </table:table-cell>
          <table:table-cell office:value-type="string">
            <text:p>EXP-PHR1</text:p>
          </table:table-cell>
        </table:table-row>
        <table:table-row>
          <table:table-cell office:value-type="string">
            <text:p>Ingangsdatum toestand</text:p>
          </table:table-cell>
          <table:table-cell office:value-type="string">
            <text:p>2026-06-03</text:p>
          </table:table-cell>
        </table:table-row>
        <table:table-row>
          <table:table-cell office:value-type="string">
            <text:p>NACE-BEL-code</text:p>
          </table:table-cell>
          <table:table-cell office:value-type="string">
            <text:p>345</text:p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Havenweg 1, 1000 Gent, België</text:p>
          </table:table-cell>
        </table:table-row>
        <table:table-row>
          <table:table-cell office:value-type="string">
            <text:p>Lambert 2008 X</text:p>
          </table:table-cell>
          <table:table-cell office:value-type="string">
            <text:p>45678</text:p>
          </table:table-cell>
        </table:table-row>
        <table:table-row>
          <table:table-cell office:value-type="string">
            <text:p>Lambert 2008 Y</text:p>
          </table:table-cell>
          <table:table-cell office:value-type="string">
            <text:p>5678</text:p>
          </table:table-cell>
        </table:table-row>
      </table:table>
      <table:table table:name="Exploitatietoestand">
        <table:table-row>
          <table:table-cell office:value-type="string">
            <text:p>Type</text:p>
          </table:table-cell>
          <table:table-cell office:value-type="string">
            <text:p>Code</text:p>
          </table:table-cell>
          <table:table-cell office:value-type="string">
            <text:p>Naam</text:p>
          </table:table-cell>
          <table:table-cell office:value-type="string">
            <text:p>Eigenschappen</text:p>
          </table:table-cell>
          <table:table-cell office:value-type="string">
            <text:p>Verbonden me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Productielijn</text:p>
          </table:table-cell>
          <table:table-cell office:value-type="string">
            <text:p>OBJ-01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  <table:table-row>
          <table:table-cell office:value-type="string">
            <text:p>Stookinstallatie</text:p>
          </table:table-cell>
          <table:table-cell office:value-type="string">
            <text:p>OBJ-02</text:p>
          </table:table-cell>
          <table:table-cell office:value-type="string">
            <text:p>Nieuw obj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pla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>
  <office:styles/>
</office:document-styles>
</file>