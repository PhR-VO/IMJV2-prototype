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Cementfabriek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TYUG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7-01-01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Scheldelaan 420, 2040 Antwerpen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647800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724300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