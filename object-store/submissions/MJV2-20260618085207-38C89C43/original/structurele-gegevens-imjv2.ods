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Demo Exploitatie NV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DEMO-EXP-00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23.990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Zaha Hadidplein 1, 203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52224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1704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PL-01</text:p>
          </table:table-cell>
          <table:table-cell office:value-type="string">
            <text:p>Productielijn keramische granulaten</text:p>
          </table:table-cell>
          <table:table-cell office:value-type="string">
            <text:p>Capaciteit: 120000 ton/jaar</text:p>
          </table:table-cell>
          <table:table-cell office:value-type="string">
            <text:p>STK-01; WZI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STK-01</text:p>
          </table:table-cell>
          <table:table-cell office:value-type="string">
            <text:p>Stoomketel lijn 1</text:p>
          </table:table-cell>
          <table:table-cell office:value-type="string">
            <text:p>Thermisch vermogen: 48 MW; brandstof: aardgas</text:p>
          </table:table-cell>
          <table:table-cell office:value-type="string">
            <text:p>PL-01; EP-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WZI-01</text:p>
          </table:table-cell>
          <table:table-cell office:value-type="string">
            <text:p>Fysico-chemische waterzuivering</text:p>
          </table:table-cell>
          <table:table-cell office:value-type="string">
            <text:p>Neutralisatie + sedimentatie + zandfilter; capaciteit: 35 m3/u</text:p>
          </table:table-cell>
          <table:table-cell office:value-type="string">
            <text:p>PL-01; EP-W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Grondwaterwinning</text:p>
          </table:table-cell>
          <table:table-cell office:value-type="string">
            <text:p>GW-01</text:p>
          </table:table-cell>
          <table:table-cell office:value-type="string">
            <text:p>Winning productieput noord</text:p>
          </table:table-cell>
          <table:table-cell office:value-type="string">
            <text:p>Putdiepte: 82 m; vergund debiet: 180000 m3/jaar; watervoerende laag: HCOV 0600</text:p>
          </table:table-cell>
          <table:table-cell office:value-type="string">
            <text:p>PL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EP-L-01</text:p>
          </table:table-cell>
          <table:table-cell office:value-type="string">
            <text:p>Schoorsteen stoomketel</text:p>
          </table:table-cell>
          <table:table-cell office:value-type="string">
            <text:p>Hoogte: 32 m; diameter: 1.2 m; Lambert 2008: 156420, 207880</text:p>
          </table:table-cell>
          <table:table-cell office:value-type="string">
            <text:p>STK-01</text:p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Emissiepunt water</text:p>
          </table:table-cell>
          <table:table-cell office:value-type="string">
            <text:p>EP-W-01</text:p>
          </table:table-cell>
          <table:table-cell office:value-type="string">
            <text:p>Lozingspunt effluent WZI</text:p>
          </table:table-cell>
          <table:table-cell office:value-type="string">
            <text:p>Lozend naar oppervlaktewater; Lambert 2008: 156385, 207842</text:p>
          </table:table-cell>
          <table:table-cell office:value-type="string">
            <text:p>WZI-01</text:p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