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Academisch Ziekenhuis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IUHS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11-12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Herestraat 49, 3000 Leuv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735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681900</text:p>
          </table:table-cell>
        </table:table-row>
        <table:table-row>
          <table:table-cell office:value-type="string">
            <text:p>Vervangt toestand</text:p>
          </table:table-cell>
          <table:table-cell office:value-type="string">
            <text:p>REPORT-MJV2-20260623151231-73C73DF4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Emissiepunt lucht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gebru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