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3-20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; STK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vergund debiet: 180000 m3/jaar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2</text:p>
          </table:table-cell>
          <table:table-cell office:value-type="string">
            <text:p>Droogoven lijn 2</text:p>
          </table:table-cell>
          <table:table-cell office:value-type="string">
            <text:p>Thermisch vermogen: 22 MW; brandstof: aardgas; ingebruikname: 20-03-2027</text:p>
          </table:table-cell>
          <table:table-cell office:value-type="string">
            <text:p>PL-01; EP-L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2</text:p>
          </table:table-cell>
          <table:table-cell office:value-type="string">
            <text:p>Schoorsteen droogoven lijn 2</text:p>
          </table:table-cell>
          <table:table-cell office:value-type="string">
            <text:p>Hoogte: 28 m; diameter: 0.9 m; Lambert 2008: 156448, 207862</text:p>
          </table:table-cell>
          <table:table-cell office:value-type="string">
            <text:p>STK-02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