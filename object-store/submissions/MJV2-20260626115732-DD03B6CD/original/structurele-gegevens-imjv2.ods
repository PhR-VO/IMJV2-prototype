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Jamfabriek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VBN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6-06-09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/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Hoogstraat 20, 1098 Gent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4567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56789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1</text:p>
          </table:table-cell>
          <table:table-cell office:value-type="string">
            <text:p>Jamproducti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Grondwaterwinning</text:p>
          </table:table-cell>
          <table:table-cell office:value-type="string">
            <text:p>OBJ-02</text:p>
          </table:table-cell>
          <table:table-cell office:value-type="string">
            <text:p>Put</text:p>
          </table:table-cell>
          <table:table-cell office:value-type="string">
            <text:p/>
          </table:table-cell>
          <table:table-cell office:value-type="string">
            <text:p>OBJ-02</text:p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