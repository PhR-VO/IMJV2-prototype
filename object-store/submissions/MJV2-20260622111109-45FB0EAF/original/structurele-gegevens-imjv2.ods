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randpaviljoen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789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6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45678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eedijk-Albertstrand 509, 8300 Knokke-Heis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5653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3320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