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office:version="1.2">
  <office:body>
    <office:spreadsheet>
      <table:table table:name="Verslaggegevens">
        <table:table-row>
          <table:table-cell office:value-type="string">
            <text:p>Gegeven</text:p>
          </table:table-cell>
          <table:table-cell office:value-type="string">
            <text:p>Waarde</text:p>
          </table:table-cell>
        </table:table-row>
        <table:table-row>
          <table:table-cell office:value-type="string">
            <text:p>Naam van de exploitatie</text:p>
          </table:table-cell>
          <table:table-cell office:value-type="string">
            <text:p>Jamfabriek</text:p>
          </table:table-cell>
        </table:table-row>
        <table:table-row>
          <table:table-cell office:value-type="string">
            <text:p>Exploitatie-ID</text:p>
          </table:table-cell>
          <table:table-cell office:value-type="string">
            <text:p>VBN</text:p>
          </table:table-cell>
        </table:table-row>
        <table:table-row>
          <table:table-cell office:value-type="string">
            <text:p>Ingangsdatum toestand</text:p>
          </table:table-cell>
          <table:table-cell office:value-type="string">
            <text:p>2026-06-18</text:p>
          </table:table-cell>
        </table:table-row>
        <table:table-row>
          <table:table-cell office:value-type="string">
            <text:p>NACE-BEL-code</text:p>
          </table:table-cell>
          <table:table-cell office:value-type="string">
            <text:p/>
          </table:table-cell>
        </table:table-row>
        <table:table-row>
          <table:table-cell office:value-type="string">
            <text:p>Adres</text:p>
          </table:table-cell>
          <table:table-cell office:value-type="string">
            <text:p>Hoogstraat 20, 1098 Gent, België</text:p>
          </table:table-cell>
        </table:table-row>
        <table:table-row>
          <table:table-cell office:value-type="string">
            <text:p>Lambert 2008 X</text:p>
          </table:table-cell>
          <table:table-cell office:value-type="string">
            <text:p>4567</text:p>
          </table:table-cell>
        </table:table-row>
        <table:table-row>
          <table:table-cell office:value-type="string">
            <text:p>Lambert 2008 Y</text:p>
          </table:table-cell>
          <table:table-cell office:value-type="string">
            <text:p>56789</text:p>
          </table:table-cell>
        </table:table-row>
        <table:table-row>
          <table:table-cell office:value-type="string">
            <text:p>Vervangt toestand</text:p>
          </table:table-cell>
          <table:table-cell office:value-type="string">
            <text:p>REPORT-MJV2-20260626115732-DD03B6CD</text:p>
          </table:table-cell>
        </table:table-row>
      </table:table>
      <table:table table:name="Exploitatietoestand">
        <table:table-row>
          <table:table-cell office:value-type="string">
            <text:p>Type</text:p>
          </table:table-cell>
          <table:table-cell office:value-type="string">
            <text:p>Code</text:p>
          </table:table-cell>
          <table:table-cell office:value-type="string">
            <text:p>Naam</text:p>
          </table:table-cell>
          <table:table-cell office:value-type="string">
            <text:p>Eigenschappen</text:p>
          </table:table-cell>
          <table:table-cell office:value-type="string">
            <text:p>Verbonden met</text:p>
          </table:table-cell>
          <table:table-cell office:value-type="string">
            <text:p>Status</text:p>
          </table:table-cell>
        </table:table-row>
        <table:table-row>
          <table:table-cell office:value-type="string">
            <text:p>Productielijn</text:p>
          </table:table-cell>
          <table:table-cell office:value-type="string">
            <text:p>OBJ-01</text:p>
          </table:table-cell>
          <table:table-cell office:value-type="string">
            <text:p>Jamproducti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 gebruik</text:p>
          </table:table-cell>
        </table:table-row>
        <table:table-row>
          <table:table-cell office:value-type="string">
            <text:p>Grondwaterwinning</text:p>
          </table:table-cell>
          <table:table-cell office:value-type="string">
            <text:p>OBJ-02</text:p>
          </table:table-cell>
          <table:table-cell office:value-type="string">
            <text:p>Put</text:p>
          </table:table-cell>
          <table:table-cell office:value-type="string">
            <text:p/>
          </table:table-cell>
          <table:table-cell office:value-type="string">
            <text:p>OBJ-02</text:p>
          </table:table-cell>
          <table:table-cell office:value-type="string">
            <text:p>In gebruik</text:p>
          </table:table-cell>
        </table:table-row>
        <table:table-row>
          <table:table-cell office:value-type="string">
            <text:p>Emissiepunt lucht</text:p>
          </table:table-cell>
          <table:table-cell office:value-type="string">
            <text:p>OBJ-03</text:p>
          </table:table-cell>
          <table:table-cell office:value-type="string">
            <text:p>schouw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 gebrui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office:version="1.2">
  <office:styles/>
</office:document-styles>
</file>