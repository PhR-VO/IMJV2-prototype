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Steenfab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OIJDKJH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567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Groenplein 1, 3500 Hassel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7071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04400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2012628-161F3606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Waterzuivering</text:p>
          </table:table-cell>
          <table:table-cell office:value-type="string">
            <text:p>OBJ-01</text:p>
          </table:table-cell>
          <table:table-cell office:value-type="string">
            <text:p>chemische waterzuive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