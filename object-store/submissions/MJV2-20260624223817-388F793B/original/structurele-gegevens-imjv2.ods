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Boterfabrie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EXP-PHR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03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345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Botermarkt 1, 9000 Gen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5936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681900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0130329-7DD06513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Boterv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OBJ-02</text:p>
          </table:table-cell>
          <table:table-cell office:value-type="string">
            <text:p>Heater</text:p>
          </table:table-cell>
          <table:table-cell office:value-type="string">
            <text:p/>
          </table:table-cell>
          <table:table-cell office:value-type="string">
            <text:p>OBJ-01</text:p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