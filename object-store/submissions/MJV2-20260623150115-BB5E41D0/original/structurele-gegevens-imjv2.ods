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Herman Terilinc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FG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30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Grote Markt 21, 2800 Mechel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609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695800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3145613-74276D30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>Veel vieze rook</text:p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