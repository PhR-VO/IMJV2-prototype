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office:version="1.2">
  <office:body>
    <office:spreadsheet>
      <table:table table:name="Verslaggegevens">
        <table:table-row>
          <table:table-cell office:value-type="string">
            <text:p>Gegeven</text:p>
          </table:table-cell>
          <table:table-cell office:value-type="string">
            <text:p>Waarde</text:p>
          </table:table-cell>
        </table:table-row>
        <table:table-row>
          <table:table-cell office:value-type="string">
            <text:p>Naam van de exploitatie</text:p>
          </table:table-cell>
          <table:table-cell office:value-type="string">
            <text:p>Herman Terilinck</text:p>
          </table:table-cell>
        </table:table-row>
        <table:table-row>
          <table:table-cell office:value-type="string">
            <text:p>Exploitatie-ID</text:p>
          </table:table-cell>
          <table:table-cell office:value-type="string">
            <text:p>DFG</text:p>
          </table:table-cell>
        </table:table-row>
        <table:table-row>
          <table:table-cell office:value-type="string">
            <text:p>Ingangsdatum toestand</text:p>
          </table:table-cell>
          <table:table-cell office:value-type="string">
            <text:p>2027-01-30</text:p>
          </table:table-cell>
        </table:table-row>
        <table:table-row>
          <table:table-cell office:value-type="string">
            <text:p>NACE-BEL-code</text:p>
          </table:table-cell>
          <table:table-cell office:value-type="string">
            <text:p/>
          </table:table-cell>
        </table:table-row>
        <table:table-row>
          <table:table-cell office:value-type="string">
            <text:p>Adres</text:p>
          </table:table-cell>
          <table:table-cell office:value-type="string">
            <text:p>Havenlaan 88, 1000 Brussel, België</text:p>
          </table:table-cell>
        </table:table-row>
        <table:table-row>
          <table:table-cell office:value-type="string">
            <text:p>Lambert 2008 X</text:p>
          </table:table-cell>
          <table:table-cell office:value-type="string">
            <text:p>None</text:p>
          </table:table-cell>
        </table:table-row>
        <table:table-row>
          <table:table-cell office:value-type="string">
            <text:p>Lambert 2008 Y</text:p>
          </table:table-cell>
          <table:table-cell office:value-type="string">
            <text:p>None</text:p>
          </table:table-cell>
        </table:table-row>
        <table:table-row>
          <table:table-cell office:value-type="string">
            <text:p>Vervangt toestand</text:p>
          </table:table-cell>
          <table:table-cell office:value-type="string">
            <text:p>REPORT-MJV2-20260623145613-74276D30</text:p>
          </table:table-cell>
        </table:table-row>
      </table:table>
      <table:table table:name="Exploitatietoestand">
        <table:table-row>
          <table:table-cell office:value-type="string">
            <text:p>Type</text:p>
          </table:table-cell>
          <table:table-cell office:value-type="string">
            <text:p>Code</text:p>
          </table:table-cell>
          <table:table-cell office:value-type="string">
            <text:p>Naam</text:p>
          </table:table-cell>
          <table:table-cell office:value-type="string">
            <text:p>Eigenschappen</text:p>
          </table:table-cell>
          <table:table-cell office:value-type="string">
            <text:p>Verbonden met</text:p>
          </table:table-cell>
          <table:table-cell office:value-type="string">
            <text:p>Status</text:p>
          </table:table-cell>
        </table:table-row>
        <table:table-row>
          <table:table-cell office:value-type="string">
            <text:p>Stookinstallatie</text:p>
          </table:table-cell>
          <table:table-cell office:value-type="string">
            <text:p>OBJ-01</text:p>
          </table:table-cell>
          <table:table-cell office:value-type="string">
            <text:p>Nieuw object</text:p>
          </table:table-cell>
          <table:table-cell office:value-type="string">
            <text:p>Veel vieze rook</text:p>
          </table:table-cell>
          <table:table-cell office:value-type="string">
            <text:p/>
          </table:table-cell>
          <table:table-cell office:value-type="string">
            <text:p>In gebrui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office:version="1.2">
  <office:styles/>
</office:document-styles>
</file>