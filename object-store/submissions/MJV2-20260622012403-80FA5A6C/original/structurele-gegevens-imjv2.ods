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Glasfariek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GLA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17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9209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Stadsplein 1, 3600 Genk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724800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11600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2011848-09538D4A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1</text:p>
          </table:table-cell>
          <table:table-cell office:value-type="string">
            <text:p>Glasov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