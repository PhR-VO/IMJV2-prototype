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Windmolenpark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RTUI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6-06-12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>567890</text:p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,  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6789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6789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Emissiepunt water</text:p>
          </table:table-cell>
          <table:table-cell office:value-type="string">
            <text:p>OBJ-01</text:p>
          </table:table-cell>
          <table:table-cell office:value-type="string">
            <text:p>Nieuw obje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