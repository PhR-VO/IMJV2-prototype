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een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OIJDKJH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24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Groenweg 2, 1000 Hassel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0171312-94AEA1BB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OBJ-01</text:p>
          </table:table-cell>
          <table:table-cell office:value-type="string">
            <text:p>chemische waterzuiv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