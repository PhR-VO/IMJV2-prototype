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Pizzeria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9876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8-25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Meir 24, 200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19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360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1</text:p>
          </table:table-cell>
          <table:table-cell office:value-type="string">
            <text:p>Uitlaat pizza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Pizza oven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3</text:p>
          </table:table-cell>
          <table:table-cell office:value-type="string">
            <text:p>2e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4</text:p>
          </table:table-cell>
          <table:table-cell office:value-type="string">
            <text:p>Nieuw object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5</text:p>
          </table:table-cell>
          <table:table-cell office:value-type="string">
            <text:p>Nieuw object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