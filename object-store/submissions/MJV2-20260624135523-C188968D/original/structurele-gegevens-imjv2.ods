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Verslaggegevens">
        <table:table-row>
          <table:table-cell office:value-type="string">
            <text:p>Gegeven</text:p>
          </table:table-cell>
          <table:table-cell office:value-type="string">
            <text:p>Waarde</text:p>
          </table:table-cell>
        </table:table-row>
        <table:table-row>
          <table:table-cell office:value-type="string">
            <text:p>Naam van de exploitatie</text:p>
          </table:table-cell>
          <table:table-cell office:value-type="string">
            <text:p>Pizzeria</text:p>
          </table:table-cell>
        </table:table-row>
        <table:table-row>
          <table:table-cell office:value-type="string">
            <text:p>Exploitatie-ID</text:p>
          </table:table-cell>
          <table:table-cell office:value-type="string">
            <text:p>9876</text:p>
          </table:table-cell>
        </table:table-row>
        <table:table-row>
          <table:table-cell office:value-type="string">
            <text:p>Ingangsdatum toestand</text:p>
          </table:table-cell>
          <table:table-cell office:value-type="string">
            <text:p>2027-08-25</text:p>
          </table:table-cell>
        </table:table-row>
        <table:table-row>
          <table:table-cell office:value-type="string">
            <text:p>NACE-BEL-code</text:p>
          </table:table-cell>
          <table:table-cell office:value-type="string">
            <text:p/>
          </table:table-cell>
        </table:table-row>
        <table:table-row>
          <table:table-cell office:value-type="string">
            <text:p>Adres</text:p>
          </table:table-cell>
          <table:table-cell office:value-type="string">
            <text:p>Straat 1, 1000 Brussel, België</text:p>
          </table:table-cell>
        </table:table-row>
        <table:table-row>
          <table:table-cell office:value-type="string">
            <text:p>Lambert 2008 X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Lambert 2008 Y</text:p>
          </table:table-cell>
          <table:table-cell office:value-type="string">
            <text:p>None</text:p>
          </table:table-cell>
        </table:table-row>
      </table:table>
      <table:table table:name="Exploitatietoestand">
        <table:table-row>
          <table:table-cell office:value-type="string">
            <text:p>Type</text:p>
          </table:table-cell>
          <table:table-cell office:value-type="string">
            <text:p>Code</text:p>
          </table:table-cell>
          <table:table-cell office:value-type="string">
            <text:p>Naam</text:p>
          </table:table-cell>
          <table:table-cell office:value-type="string">
            <text:p>Eigenschappen</text:p>
          </table:table-cell>
          <table:table-cell office:value-type="string">
            <text:p>Verbonden me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Emissiepunt lucht</text:p>
          </table:table-cell>
          <table:table-cell office:value-type="string">
            <text:p>OBJ-01</text:p>
          </table:table-cell>
          <table:table-cell office:value-type="string">
            <text:p>Uitlaat pizza ov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OBJ-02</text:p>
          </table:table-cell>
          <table:table-cell office:value-type="string">
            <text:p>Nieuw Pizza oven</text:p>
          </table:table-cell>
          <table:table-cell office:value-type="string">
            <text:p/>
          </table:table-cell>
          <table:table-cell office:value-type="string">
            <text:p>OBJ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OBJ-03</text:p>
          </table:table-cell>
          <table:table-cell office:value-type="string">
            <text:p>2e ov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OBJ-04</text:p>
          </table:table-cell>
          <table:table-cell office:value-type="string">
            <text:p>Nieuw object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OBJ-05</text:p>
          </table:table-cell>
          <table:table-cell office:value-type="string">
            <text:p>Nieuw object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 gebrui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