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Pizzeria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9876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4-28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Straat 1, 1000 Brussel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1</text:p>
          </table:table-cell>
          <table:table-cell office:value-type="string">
            <text:p>Uitlaat pizza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Pizza oven</text:p>
          </table:table-cell>
          <table:table-cell office:value-type="string">
            <text:p/>
          </table:table-cell>
          <table:table-cell office:value-type="string">
            <text:p>OBJ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3</text:p>
          </table:table-cell>
          <table:table-cell office:value-type="string">
            <text:p>2e ov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