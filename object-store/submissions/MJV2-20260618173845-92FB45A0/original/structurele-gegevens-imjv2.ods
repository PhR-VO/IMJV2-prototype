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STK-01; 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; capaciteit: 35 m3/u</text:p>
          </table:table-cell>
          <table:table-cell office:value-type="string">
            <text:p>PL-01; EP-W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debietmeter: DM-4451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PHR-01</text:p>
          </table:table-cell>
          <table:table-cell office:value-type="string">
            <text:p>Grote smur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OBJ-08</text:p>
          </table:table-cell>
          <table:table-cell office:value-type="string">
            <text:p>Kabouter Pl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