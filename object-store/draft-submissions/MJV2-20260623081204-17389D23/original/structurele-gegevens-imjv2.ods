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Strandpaviljoen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789U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16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45678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Zeedijk-Albertstrand 509, 8300 Knokke-Heist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565300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33200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2111109-45FB0EAF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